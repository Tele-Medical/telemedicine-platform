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Preformatted_20_Text">
      <style:paragraph-properties fo:margin-top="0in" fo:margin-bottom="0.1965in" style:contextual-spacing="false"/>
    </style:style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0">
      <style:paragraph-properties fo:margin-top="0in" fo:margin-bottom="0in" style:contextual-spacing="false"/>
    </style:style>
    <style:style style:name="P23" style:family="paragraph" style:parent-style-name="Text_20_body" style:list-style-name="L21"/>
    <style:style style:name="P24" style:family="paragraph" style:parent-style-name="Text_20_body" style:list-style-name="L22"/>
    <style:style style:name="P25" style:family="paragraph" style:parent-style-name="Text_20_body" style:list-style-name="L23"/>
    <style:style style:name="P26" style:family="paragraph" style:parent-style-name="Text_20_body" style:list-style-name="L24"/>
    <style:style style:name="P27" style:family="paragraph" style:parent-style-name="Text_20_body" style:list-style-name="L25"/>
    <style:style style:name="P28" style:family="paragraph" style:parent-style-name="Text_20_body" style:list-style-name="L26"/>
    <style:style style:name="P29" style:family="paragraph" style:parent-style-name="Text_20_body" style:list-style-name="L27"/>
    <style:style style:name="P30" style:family="paragraph" style:parent-style-name="Text_20_body" style:list-style-name="L28"/>
    <style:style style:name="P31" style:family="paragraph" style:parent-style-name="Text_20_body" style:list-style-name="L29"/>
    <style:style style:name="P32" style:family="paragraph" style:parent-style-name="Text_20_body" style:list-style-name="L30"/>
    <style:style style:name="P33" style:family="paragraph" style:parent-style-name="Text_20_body" style:list-style-name="L31"/>
    <style:style style:name="P34" style:family="paragraph" style:parent-style-name="Text_20_body" style:list-style-name="L32"/>
    <style:style style:name="P35" style:family="paragraph" style:parent-style-name="Text_20_body" style:list-style-name="L33"/>
    <style:style style:name="P36" style:family="paragraph" style:parent-style-name="Text_20_body" style:list-style-name="L34"/>
    <style:style style:name="P37" style:family="paragraph" style:parent-style-name="Text_20_body" style:list-style-name="L35"/>
    <style:style style:name="P38" style:family="paragraph" style:parent-style-name="Text_20_body" style:list-style-name="L36"/>
    <style:style style:name="P39" style:family="paragraph" style:parent-style-name="Text_20_body" style:list-style-name="L37"/>
    <style:style style:name="P40" style:family="paragraph" style:parent-style-name="Text_20_body" style:list-style-name="L38"/>
    <style:style style:name="P41" style:family="paragraph" style:parent-style-name="Text_20_body" style:list-style-name="L39"/>
    <style:style style:name="P42" style:family="paragraph" style:parent-style-name="Text_20_body" style:list-style-name="L40"/>
    <style:style style:name="P43" style:family="paragraph" style:parent-style-name="Text_20_body" style:list-style-name="L41"/>
    <style:style style:name="P44" style:family="paragraph" style:parent-style-name="Text_20_body" style:list-style-name="L42"/>
    <style:style style:name="P45" style:family="paragraph" style:parent-style-name="Text_20_body" style:list-style-name="L43"/>
    <style:style style:name="P46" style:family="paragraph" style:parent-style-name="Text_20_body" style:list-style-name="L44"/>
    <style:style style:name="P47" style:family="paragraph" style:parent-style-name="Text_20_body" style:list-style-name="L45"/>
    <style:style style:name="P48" style:family="paragraph" style:parent-style-name="Text_20_body" style:list-style-name="L46"/>
    <style:style style:name="P49" style:family="paragraph" style:parent-style-name="Text_20_body" style:list-style-name="L47"/>
    <style:style style:name="P50" style:family="paragraph" style:parent-style-name="Text_20_body" style:list-style-name="L48"/>
    <style:style style:name="P51" style:family="paragraph" style:parent-style-name="Text_20_body" style:list-style-name="L49"/>
    <style:style style:name="P52" style:family="paragraph" style:parent-style-name="Text_20_body" style:list-style-name="L50"/>
    <style:style style:name="P53" style:family="paragraph" style:parent-style-name="Text_20_body" style:list-style-name="L51"/>
    <style:style style:name="P54" style:family="paragraph" style:parent-style-name="Text_20_body" style:list-style-name="L52"/>
    <style:style style:name="P55" style:family="paragraph" style:parent-style-name="Text_20_body" style:list-style-name="L53"/>
    <style:style style:name="P56" style:family="paragraph" style:parent-style-name="Text_20_body" style:list-style-name="L54"/>
    <style:style style:name="P57" style:family="paragraph" style:parent-style-name="Text_20_body" style:list-style-name="L55"/>
    <style:style style:name="P58" style:family="paragraph" style:parent-style-name="Text_20_body" style:list-style-name="L56"/>
    <style:style style:name="P59" style:family="paragraph" style:parent-style-name="Text_20_body" style:list-style-name="L57"/>
    <style:style style:name="P60" style:family="paragraph" style:parent-style-name="Text_20_body" style:list-style-name="L58"/>
    <style:style style:name="T1" style:family="text">
      <style:text-properties fo:font-weight="bold"/>
    </style:style>
    <style:style style:name="T2" style:family="text">
      <style:text-properties style:font-name="Liberation Mono"/>
    </style:style>
    <style:style style:name="T3" style:family="text">
      <style:text-properties officeooo:rsid="0017ef4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ackend Detailed Build Phase Plan</text:h>
      <text:h text:style-name="Heading_20_2" text:outline-level="2">Purpose</text:h>
      <text:p text:style-name="Text_20_body">This document is the <text:span text:style-name="T1">execution plan</text:span> for building the backend from zero.</text:p>
      <text:p text:style-name="Text_20_body">Unlike <text:span text:style-name="T2">backend_implementation_plan.md</text:span>, which explains what the backend must support, this file explains:</text:p>
      <text:list text:style-name="L1">
        <text:list-item>
          <text:p text:style-name="P1">what to build first</text:p>
        </text:list-item>
        <text:list-item>
          <text:p text:style-name="P1">what folders to create</text:p>
        </text:list-item>
        <text:list-item>
          <text:p text:style-name="P1">what packages to install</text:p>
        </text:list-item>
        <text:list-item>
          <text:p text:style-name="P1">what code to write in each phase</text:p>
        </text:list-item>
        <text:list-item>
          <text:p text:style-name="P1">what endpoints and modules to finish before moving ahead</text:p>
        </text:list-item>
      </text:list>
      <text:p text:style-name="Text_20_body">This is written as a practical implementation guide.</text:p>
      <text:p text:style-name="Horizontal_20_Line"/>
      <text:h text:style-name="Heading_20_2" text:outline-level="2">Assumptions</text:h>
      <text:list text:style-name="L2">
        <text:list-item>
          <text:p text:style-name="P2">Backend stack: <text:span text:style-name="T2">FastAPI + PostgreSQL + SQLAlchemy + Alembic + Pydantic + Redis</text:span></text:p>
        </text:list-item>
        <text:list-item>
          <text:p text:style-name="P2">Architecture: modular monolith</text:p>
        </text:list-item>
        <text:list-item>
          <text:p text:style-name="P2">Patient login: OTP-based</text:p>
        </text:list-item>
        <text:list-item>
          <text:p text:style-name="P2">Staff login: username/email + password</text:p>
        </text:list-item>
        <text:list-item>
          <text:p text:style-name="P2">ABHA: optional linkage, not mandatory for MVP</text:p>
        </text:list-item>
        <text:list-item>
          <text:p text:style-name="P2">Offline sync support: required</text:p>
        </text:list-item>
        <text:list-item>
          <text:p text:style-name="P2">Core business flow: <text:span text:style-name="T2">patient/worker registration -&gt; appointment -&gt; encounter -&gt; records -&gt; prescription -&gt; pharmacy fulfillment</text:span></text:p>
        </text:list-item>
      </text:list>
      <text:p text:style-name="Horizontal_20_Line"/>
      <text:h text:style-name="Heading_20_2" text:outline-level="2">Build order</text:h>
      <text:p text:style-name="Text_20_body">Build the backend in this order:</text:p>
      <text:list text:style-name="L3">
        <text:list-item>
          <text:p text:style-name="P3">project bootstrap</text:p>
        </text:list-item>
        <text:list-item>
          <text:p text:style-name="P3">database and migrations</text:p>
        </text:list-item>
        <text:list-item>
          <text:p text:style-name="P3">auth and identity</text:p>
        </text:list-item>
        <text:list-item>
          <text:p text:style-name="P3"><text:soft-page-break/>patient and practitioner core</text:p>
        </text:list-item>
        <text:list-item>
          <text:p text:style-name="P3">appointments and encounters</text:p>
        </text:list-item>
        <text:list-item>
          <text:p text:style-name="P3">clinical records</text:p>
        </text:list-item>
        <text:list-item>
          <text:p text:style-name="P3">sync engine</text:p>
        </text:list-item>
        <text:list-item>
          <text:p text:style-name="P3">pharmacy and prescriptions</text:p>
        </text:list-item>
        <text:list-item>
          <text:p text:style-name="P3">audit, consent, provenance</text:p>
        </text:list-item>
        <text:list-item>
          <text:p text:style-name="P3">AI support hooks</text:p>
        </text:list-item>
        <text:list-item>
          <text:p text:style-name="P3">hardening and test coverage</text:p>
        </text:list-item>
      </text:list>
      <text:p text:style-name="Text_20_body">Do not start by building every endpoint randomly.</text:p>
      <text:p text:style-name="Horizontal_20_Line"/>
      <text:h text:style-name="Heading_20_2" text:outline-level="2">Phase 0: Project Bootstrap</text:h>
      <text:h text:style-name="Heading_20_2" text:outline-level="2">Goal</text:h>
      <text:p text:style-name="Text_20_body">Create a clean backend skeleton that can scale without becoming a mess.</text:p>
      <text:h text:style-name="Heading_20_2" text:outline-level="2">Exact tasks</text:h>
      <text:h text:style-name="Heading_20_3" text:outline-level="3">1. Initialize local infrastructure</text:h>
      <text:p text:style-name="Text_20_body">Create a <text:span text:style-name="T2">docker-compose.yml</text:span> file in the root directory to run PostgreSQL and Redis locally. Start them with <text:span text:style-name="T2">docker-compose up -d</text:span>. Note: The FastAPI server will run on your host machine to allow fast code reloading.</text:p>
      <text:h text:style-name="Heading_20_3" text:outline-level="3">2. Create backend folder structure</text:h>
      <text:p text:style-name="P4">backend/<text:line-break/>├── app/<text:line-break/>│ <text:s text:c="2"/>├── main.py<text:line-break/>│ <text:s text:c="2"/>├── core/<text:line-break/>│ <text:s text:c="2"/>├── api/<text:line-break/>│ <text:s text:c="2"/>├── domain/<text:line-break/>│ <text:s text:c="2"/>├── models/<text:line-break/>│ <text:s text:c="2"/>├── schemas/<text:line-break/>│ <text:s text:c="2"/>├── repositories/<text:line-break/>│ <text:s text:c="2"/>├── services/<text:line-break/>│ <text:s text:c="2"/>├── integrations/<text:line-break/>│ <text:s text:c="2"/>└── jobs/<text:line-break/>├── migrations/<text:line-break/>├── tests/<text:line-break/>├── pyproject.toml<text:line-break/>├── alembic.ini<text:line-break/>├── .env.example<text:line-break/>└── Dockerfile</text:p>
      <text:h text:style-name="Heading_20_3" text:outline-level="3"><text:soft-page-break/>2. Initialize Python project</text:h>
      <text:p text:style-name="Text_20_body">Run the following command inside the <text:span text:style-name="T2">backend/</text:span> directory:</text:p>
      <text:p text:style-name="P4">uv init</text:p>
      <text:p text:style-name="Text_20_body"><text:span text:style-name="T2">uv</text:span> will automatically manage your virtual environment and dependencies.</text:p>
      <text:h text:style-name="Heading_20_3" text:outline-level="3">3. Install dependencies</text:h>
      <text:p text:style-name="Text_20_body">Run these commands to add the necessary packages to your <text:span text:style-name="T2">pyproject.toml</text:span> and create a <text:span text:style-name="T2">uv.lock</text:span> file:</text:p>
      <text:p text:style-name="P4"># Add runtime dependencies<text:line-break/>uv add fastapi uvicorn sqlalchemy alembic "psycopg[binary]" pydantic pydantic-settings python-jose "passlib[bcrypt]" python-multipart redis httpx<text:line-break/><text:line-break/># Add development dependencies<text:line-break/>uv add --dev pytest pytest-asyncio pytest-cov ruff mypy</text:p>
      <text:h text:style-name="Heading_20_3" text:outline-level="3">4. Create <text:span text:style-name="T2">pyproject.toml</text:span></text:h>
      <text:p text:style-name="Text_20_body"><text:span text:style-name="T2">uv init</text:span> creates this for you. Ensure it includes the following (uv will manage most of this):</text:p>
      <text:p text:style-name="P4">[project]<text:line-break/>name = "telemedicine-backend"<text:line-break/>version = "0.1.0"<text:line-break/>requires-python = "&gt;=3.12"<text:line-break/><text:line-break/>[tool.ruff]<text:line-break/>line-length = 100<text:line-break/><text:line-break/>[tool.pytest.ini_options]<text:line-break/>asyncio_mode = "auto"</text:p>
      <text:h text:style-name="Heading_20_3" text:outline-level="3">5. Create initial app entrypoint</text:h>
      <text:p text:style-name="Text_20_body">File: <text:span text:style-name="T2">backend/app/main.py</text:span></text:p>
      <text:p text:style-name="P4">from fastapi import FastAPI<text:line-break/><text:line-break/>app = FastAPI(title="Telemedicine Backend", version="0.1.0")<text:line-break/><text:line-break/><text:line-break/>@app.get("/health/live")<text:line-break/>async def live():<text:line-break/> <text:s text:c="3"/>return {"status": "ok"}</text:p>
      <text:h text:style-name="Heading_20_3" text:outline-level="3">6. Run the server</text:h>
      <text:p text:style-name="P4">uv run uvicorn app.main:app --reload</text:p>
      <text:h text:style-name="Heading_20_2" text:outline-level="2"><text:soft-page-break/>Done when</text:h>
      <text:list text:style-name="L4">
        <text:list-item>
          <text:p text:style-name="P5">backend folder exists</text:p>
        </text:list-item>
        <text:list-item>
          <text:p text:style-name="P5">FastAPI app starts via <text:span text:style-name="T2">uv run</text:span></text:p>
        </text:list-item>
        <text:list-item>
          <text:p text:style-name="P5"><text:span text:style-name="T2">/health/live</text:span> returns <text:span text:style-name="T2">200</text:span></text:p>
        </text:list-item>
        <text:list-item>
          <text:p text:style-name="P5"><text:span text:style-name="T2">uv.lock</text:span> is generated</text:p>
        </text:list-item>
      </text:list>
      <text:p text:style-name="Horizontal_20_Line"/>
      <text:h text:style-name="Heading_20_2" text:outline-level="2">Phase 1: Core Infrastructure Setup</text:h>
      <text:h text:style-name="Heading_20_2" text:outline-level="2">Goal</text:h>
      <text:p text:style-name="Text_20_body">Create the reusable backend foundation before building business features.</text:p>
      <text:h text:style-name="Heading_20_2" text:outline-level="2">Folders to create</text:h>
      <text:p text:style-name="P4">backend/app/core/<text:line-break/>backend/app/api/<text:line-break/>backend/app/api/v1/<text:line-break/>backend/app/models/<text:line-break/>backend/app/schemas/<text:line-break/>backend/app/repositories/<text:line-break/>backend/app/services/</text:p>
      <text:h text:style-name="Heading_20_2" text:outline-level="2">Files to create</text:h>
      <text:p text:style-name="P4">app/core/config.py<text:line-break/>app/core/database.py<text:line-break/>app/core/security.py<text:line-break/>app/core/logging.py<text:line-break/>app/api/deps.py<text:line-break/>app/api/router.py</text:p>
      <text:h text:style-name="Heading_20_2" text:outline-level="2">Exact tasks</text:h>
      <text:h text:style-name="Heading_20_3" text:outline-level="3">1. Add settings management</text:h>
      <text:p text:style-name="Text_20_body">File: <text:span text:style-name="T2">app/core/config.py</text:span></text:p>
      <text:p text:style-name="P4">from pydantic_settings import BaseSettings, SettingsConfigDict<text:line-break/><text:line-break/><text:line-break/>class Settings(BaseSettings):<text:line-break/> <text:s text:c="3"/>app_env: str = "development"<text:line-break/> <text:s text:c="3"/>database_url: str<text:line-break/> <text:s text:c="3"/>redis_url: str<text:line-break/> <text:s text:c="3"/>jwt_secret: str<text:line-break/> <text:s text:c="3"/>jwt_algorithm: str = "HS256"<text:line-break/> <text:s text:c="3"/>access_token_exp_minutes: int = 30<text:line-break/><text:soft-page-break/> <text:s text:c="3"/>refresh_token_exp_minutes: int = 60 * 24 * 7<text:line-break/><text:line-break/> <text:s text:c="3"/>model_config = SettingsConfigDict(env_file=".env")<text:line-break/><text:line-break/><text:line-break/>settings = Settings()</text:p>
      <text:h text:style-name="Heading_20_3" text:outline-level="3">2. Add database engine and session</text:h>
      <text:p text:style-name="Text_20_body">File: <text:span text:style-name="T2">app/core/database.py</text:span></text:p>
      <text:p text:style-name="P4">from sqlalchemy import create_engine<text:line-break/>from sqlalchemy.orm import declarative_base, sessionmaker<text:line-break/><text:line-break/>from app.core.config import settings<text:line-break/><text:line-break/>engine = create_engine(settings.database_url, future=True)<text:line-break/>SessionLocal = sessionmaker(bind=engine, autoflush=False, autocommit=False, future=True)<text:line-break/>Base = declarative_base()</text:p>
      <text:h text:style-name="Heading_20_3" text:outline-level="3">3. Add dependency for DB sessions</text:h>
      <text:p text:style-name="Text_20_body">File: <text:span text:style-name="T2">app/api/deps.py</text:span></text:p>
      <text:p text:style-name="P4">from collections.abc import Generator<text:line-break/>from app.core.database import SessionLocal<text:line-break/><text:line-break/><text:line-break/>def get_db() -&gt; Generator:<text:line-break/> <text:s text:c="3"/>db = SessionLocal()<text:line-break/> <text:s text:c="3"/>try:<text:line-break/> <text:s text:c="7"/>yield db<text:line-break/> <text:s text:c="3"/>finally:<text:line-break/> <text:s text:c="7"/>db.close()</text:p>
      <text:h text:style-name="Heading_20_3" text:outline-level="3">4. Add API router root</text:h>
      <text:p text:style-name="Text_20_body">File: <text:span text:style-name="T2">app/api/router.py</text:span></text:p>
      <text:p text:style-name="P4">from fastapi import APIRouter<text:line-break/><text:line-break/>api_router = APIRouter(prefix="/api/v1")</text:p>
      <text:h text:style-name="Heading_20_3" text:outline-level="3">5. Mount the router in <text:span text:style-name="T2">main.py</text:span></text:h>
      <text:p text:style-name="P4">from fastapi import FastAPI<text:line-break/>from app.api.router import api_router<text:line-break/><text:line-break/>app = FastAPI(title="Telemedicine Backend", version="0.1.0")<text:line-break/>app.include_router(api_router)</text:p>
      <text:h text:style-name="Heading_20_3" text:outline-level="3">6. Create <text:span text:style-name="T2">.env.example</text:span></text:h>
      <text:p text:style-name="P4">APP_ENV=development<text:line-break/><text:soft-page-break/>DATABASE_URL=postgresql+psycopg://postgres:postgres@localhost:5432/telemedicine<text:line-break/>REDIS_URL=redis://localhost:6379/0<text:line-break/>JWT_SECRET=change-me</text:p>
      <text:h text:style-name="Heading_20_2" text:outline-level="2">Done when</text:h>
      <text:list text:style-name="L5">
        <text:list-item>
          <text:p text:style-name="P6">settings load from env</text:p>
        </text:list-item>
        <text:list-item>
          <text:p text:style-name="P6">DB session dependency works</text:p>
        </text:list-item>
        <text:list-item>
          <text:p text:style-name="P6">API base path <text:span text:style-name="T2">/api/v1</text:span> is ready</text:p>
        </text:list-item>
      </text:list>
      <text:p text:style-name="Horizontal_20_Line"/>
      <text:h text:style-name="Heading_20_2" text:outline-level="2">Phase 2: Database, Alembic, and Base Models</text:h>
      <text:h text:style-name="Heading_20_2" text:outline-level="2">Goal</text:h>
      <text:p text:style-name="Text_20_body">Set up migrations and create the first schema foundations.</text:p>
      <text:h text:style-name="Heading_20_2" text:outline-level="2">Exact tasks</text:h>
      <text:h text:style-name="Heading_20_3" text:outline-level="3">1. Initialize Alembic</text:h>
      <text:p text:style-name="P4">cd backend<text:line-break/>alembic init migrations</text:p>
      <text:h text:style-name="Heading_20_3" text:outline-level="3">2. Configure <text:span text:style-name="T2">alembic.ini</text:span></text:h>
      <text:p text:style-name="Text_20_body">Set DB URL or wire it through <text:span text:style-name="T2">env.py</text:span>.</text:p>
      <text:h text:style-name="Heading_20_3" text:outline-level="3">3. Update <text:span text:style-name="T2">migrations/env.py</text:span></text:h>
      <text:p text:style-name="Text_20_body">Import your metadata:</text:p>
      <text:p text:style-name="P4">from app.core.database import Base<text:line-break/>target_metadata = Base.metadata</text:p>
      <text:h text:style-name="Heading_20_3" text:outline-level="3">4. Create model groups in this order</text:h>
      <text:list text:style-name="L6">
        <text:list-item>
          <text:p text:style-name="P7">auth and identity</text:p>
        </text:list-item>
        <text:list-item>
          <text:p text:style-name="P7">patient</text:p>
        </text:list-item>
        <text:list-item>
          <text:p text:style-name="P7">practitioner</text:p>
        </text:list-item>
        <text:list-item>
          <text:p text:style-name="P7">appointments and encounters</text:p>
        </text:list-item>
        <text:list-item>
          <text:p text:style-name="P7">clinical records</text:p>
        </text:list-item>
        <text:list-item>
          <text:p text:style-name="P7">inventory and prescriptions</text:p>
        </text:list-item>
        <text:list-item>
          <text:p text:style-name="P7"><text:soft-page-break/>audit and consent</text:p>
        </text:list-item>
      </text:list>
      <text:h text:style-name="Heading_20_3" text:outline-level="3" text:is-list-header="true">5. First models to write</text:h>
      <text:p text:style-name="Text_20_body">Files:</text:p>
      <text:p text:style-name="P4">app/models/auth.py<text:line-break/>app/models/patient.py<text:line-break/>app/models/practitioner.py</text:p>
      <text:p text:style-name="Text_20_body">Example: <text:span text:style-name="T2">app/models/patient.py</text:span></text:p>
      <text:p text:style-name="P4">from sqlalchemy import BigInteger, Boolean, Date, DateTime, ForeignKey, String<text:line-break/>from sqlalchemy.dialects.postgresql import UUID<text:line-break/>from sqlalchemy.orm import Mapped, mapped_column<text:line-break/>import uuid<text:line-break/>from datetime import datetime<text:line-break/><text:line-break/>from app.core.database import Base<text:line-break/><text:line-break/><text:line-break/>class Patient(Base):<text:line-break/> <text:s text:c="3"/>__tablename__ = "patients"<text:line-break/><text:line-break/> <text:s text:c="3"/>id: Mapped[uuid.UUID] = mapped_column(UUID(as_uuid=True), primary_key=True, default=uuid.uuid4)<text:line-break/> <text:s text:c="3"/>abha_id: Mapped[str | None] = mapped_column(String, nullable=True)<text:line-break/> <text:s text:c="3"/>full_name: Mapped[str] = mapped_column(String, nullable=False)<text:line-break/> <text:s text:c="3"/>phone: Mapped[str | None] = mapped_column(String, nullable=True)<text:line-break/> <text:s text:c="3"/>preferred_language: Mapped[str] = mapped_column(String, default="pa")<text:line-break/> <text:s text:c="3"/>date_of_birth: Mapped[datetime | None] = mapped_column(Date, nullable=True)<text:line-break/> <text:s text:c="3"/>created_by_user_id: Mapped[uuid.UUID | None] = mapped_column(UUID(as_uuid=True), ForeignKey("users.id"))<text:line-break/> <text:s text:c="3"/>updated_by_user_id: Mapped[uuid.UUID | None] = mapped_column(UUID(as_uuid=True), ForeignKey("users.id"))<text:line-break/> <text:s text:c="3"/>record_version: Mapped[int] = mapped_column(BigInteger, default=1)<text:line-break/> <text:s text:c="3"/>is_active: Mapped[bool] = mapped_column(Boolean, default=True)<text:line-break/> <text:s text:c="3"/>created_at: Mapped[datetime] = mapped_column(DateTime(timezone=True), default=datetime.utcnow)<text:line-break/> <text:s text:c="3"/>updated_at: Mapped[datetime] = mapped_column(DateTime(timezone=True), default=datetime.utcnow)</text:p>
      <text:h text:style-name="Heading_20_3" text:outline-level="3">6. Generate first migration</text:h>
      <text:p text:style-name="P4">alembic revision --autogenerate -m "create auth and patient tables"<text:line-break/>alembic upgrade head</text:p>
      <text:h text:style-name="Heading_20_2" text:outline-level="2">Important rule</text:h>
      <text:p text:style-name="Text_20_body">Do not build many features before migrations work properly.</text:p>
      <text:h text:style-name="Heading_20_2" text:outline-level="2">Done when</text:h>
      <text:list text:style-name="L7">
        <text:list-item>
          <text:p text:style-name="P8">Alembic works end-to-end</text:p>
        </text:list-item>
        <text:list-item>
          <text:p text:style-name="P8"><text:soft-page-break/>base tables exist in PostgreSQL</text:p>
        </text:list-item>
        <text:list-item>
          <text:p text:style-name="P8">migrations are reproducible</text:p>
        </text:list-item>
      </text:list>
      <text:p text:style-name="Horizontal_20_Line"/>
      <text:h text:style-name="Heading_20_2" text:outline-level="2">Phase 3: Auth and Identity</text:h>
      <text:h text:style-name="Heading_20_2" text:outline-level="2">Goal</text:h>
      <text:p text:style-name="Text_20_body">Build authentication, session handling, and ABHA-ready patient identity.</text:p>
      <text:h text:style-name="Heading_20_2" text:outline-level="2">Exact tasks</text:h>
      <text:h text:style-name="Heading_20_3" text:outline-level="3">1. Create folders</text:h>
      <text:p text:style-name="P4">app/domain/auth/<text:line-break/>app/domain/identity/<text:line-break/>app/schemas/auth.py<text:line-break/>app/schemas/identity.py<text:line-break/>app/services/auth_service.py<text:line-break/>app/services/identity_service.py<text:line-break/>app/api/v1/auth.py<text:line-break/>app/api/v1/patients.py</text:p>
      <text:h text:style-name="Heading_20_3" text:outline-level="3">2. Add auth-related tables</text:h>
      <text:list text:style-name="L8">
        <text:list-item>
          <text:p text:style-name="P9"><text:span text:style-name="T2">users</text:span></text:p>
        </text:list-item>
        <text:list-item>
          <text:p text:style-name="P9"><text:span text:style-name="T2">roles</text:span></text:p>
        </text:list-item>
        <text:list-item>
          <text:p text:style-name="P9"><text:span text:style-name="T2">user_roles</text:span></text:p>
        </text:list-item>
        <text:list-item>
          <text:p text:style-name="P9"><text:span text:style-name="T2">sessions</text:span></text:p>
        </text:list-item>
        <text:list-item>
          <text:p text:style-name="P9"><text:span text:style-name="T2">otp_challenges</text:span></text:p>
        </text:list-item>
        <text:list-item>
          <text:p text:style-name="P9"><text:span text:style-name="T2">device_registrations</text:span></text:p>
        </text:list-item>
        <text:list-item>
          <text:p text:style-name="P9"><text:span text:style-name="T2">patient_identifiers</text:span></text:p>
        </text:list-item>
      </text:list>
      <text:h text:style-name="Heading_20_3" text:outline-level="3" text:is-list-header="true">3. Implement OTP request endpoint</text:h>
      <text:p text:style-name="P4">from fastapi import APIRouter<text:line-break/>from pydantic import BaseModel<text:line-break/><text:line-break/>router = APIRouter(prefix="/auth", tags=["auth"])<text:line-break/><text:line-break/><text:line-break/>class OTPRequestIn(BaseModel):<text:line-break/> <text:s text:c="3"/>phone: str<text:line-break/><text:line-break/><text:line-break/>@router.post("/request-otp")<text:line-break/><text:soft-page-break/>async def request_otp(payload: OTPRequestIn):<text:line-break/> <text:s text:c="3"/>return {"message": "OTP requested"}</text:p>
      <text:h text:style-name="Heading_20_3" text:outline-level="3">4. Implement OTP verify endpoint</text:h>
      <text:p text:style-name="Text_20_body">Responsibilities:</text:p>
      <text:list text:style-name="L9">
        <text:list-item>
          <text:p text:style-name="P10">verify OTP</text:p>
        </text:list-item>
        <text:list-item>
          <text:p text:style-name="P10">create/find patient-linked user if needed</text:p>
        </text:list-item>
        <text:list-item>
          <text:p text:style-name="P10">create session row</text:p>
        </text:list-item>
        <text:list-item>
          <text:p text:style-name="P10">return access token + refresh token</text:p>
        </text:list-item>
      </text:list>
      <text:h text:style-name="Heading_20_3" text:outline-level="3" text:is-list-header="true">5. Implement staff login</text:h>
      <text:p text:style-name="Text_20_body">Endpoint:</text:p>
      <text:p text:style-name="P4">POST /api/v1/auth/staff/login</text:p>
      <text:p text:style-name="Text_20_body">Responsibilities:</text:p>
      <text:list text:style-name="L10">
        <text:list-item>
          <text:p text:style-name="P11">verify password</text:p>
        </text:list-item>
        <text:list-item>
          <text:p text:style-name="P11">load staff roles</text:p>
        </text:list-item>
        <text:list-item>
          <text:p text:style-name="P11">create session row</text:p>
        </text:list-item>
        <text:list-item>
          <text:p text:style-name="P11">return JWTs</text:p>
        </text:list-item>
      </text:list>
      <text:h text:style-name="Heading_20_3" text:outline-level="3" text:is-list-header="true">6. Implement JWT utilities</text:h>
      <text:p text:style-name="Text_20_body">In <text:span text:style-name="T2">app/core/security.py</text:span>:</text:p>
      <text:list text:style-name="L11">
        <text:list-item>
          <text:p text:style-name="P12">token creation</text:p>
        </text:list-item>
        <text:list-item>
          <text:p text:style-name="P12">token decoding</text:p>
        </text:list-item>
        <text:list-item>
          <text:p text:style-name="P12">refresh token rotation</text:p>
        </text:list-item>
      </text:list>
      <text:h text:style-name="Heading_20_3" text:outline-level="3" text:is-list-header="true">7. Implement identity model correctly</text:h>
      <text:p text:style-name="Text_20_body">Patient identity must support:</text:p>
      <text:list text:style-name="L12">
        <text:list-item>
          <text:p text:style-name="P13">internal patient ID</text:p>
        </text:list-item>
        <text:list-item>
          <text:p text:style-name="P13">optional ABHA ID</text:p>
        </text:list-item>
        <text:list-item>
          <text:p text:style-name="P13">future external IDs</text:p>
        </text:list-item>
        <text:list-item>
          <text:p text:style-name="P13">no-phone patients</text:p>
        </text:list-item>
        <text:list-item>
          <text:p text:style-name="P13">child patients with guardian contact</text:p>
        </text:list-item>
      </text:list>
      <text:h text:style-name="Heading_20_3" text:outline-level="3" text:is-list-header="true"><text:soft-page-break/>8. Add patient identifier endpoints</text:h>
      <text:p text:style-name="P4">GET <text:s/>/api/v1/patients/{id}/identifiers<text:line-break/>POST /api/v1/patients/{id}/identifiers<text:line-break/>POST /api/v1/patients/{id}/link-abha<text:line-break/>POST /api/v1/patients/{id}/unlink-abha</text:p>
      <text:h text:style-name="Heading_20_2" text:outline-level="2">Done when</text:h>
      <text:list text:style-name="L13">
        <text:list-item>
          <text:p text:style-name="P14">patient OTP login works</text:p>
        </text:list-item>
        <text:list-item>
          <text:p text:style-name="P14">staff login works</text:p>
        </text:list-item>
        <text:list-item>
          <text:p text:style-name="P14">roles are enforced</text:p>
        </text:list-item>
        <text:list-item>
          <text:p text:style-name="P14">patient identity is not tied only to phone number</text:p>
        </text:list-item>
      </text:list>
      <text:p text:style-name="Horizontal_20_Line"/>
      <text:h text:style-name="Heading_20_2" text:outline-level="2">Phase 4: Patient and Practitioner Core</text:h>
      <text:h text:style-name="Heading_20_2" text:outline-level="2">Goal</text:h>
      <text:p text:style-name="Text_20_body">Build the base record system for patient profiles and practitioner lookup.</text:p>
      <text:h text:style-name="Heading_20_2" text:outline-level="2">Exact tasks</text:h>
      <text:h text:style-name="Heading_20_3" text:outline-level="3">1. Add schemas</text:h>
      <text:p text:style-name="Text_20_body">Files:</text:p>
      <text:p text:style-name="P4">app/schemas/patient.py<text:span text:style-name="T3">d</text:span><text:line-break/>app/schemas/practitioner.py</text:p>
      <text:p text:style-name="Text_20_body">Example:</text:p>
      <text:p text:style-name="P4">from pydantic import BaseModel<text:line-break/>from uuid import UUID<text:line-break/><text:line-break/><text:line-break/>class PatientCreate(BaseModel):<text:line-break/> <text:s text:c="3"/>full_name: str<text:line-break/> <text:s text:c="3"/>phone: str | None = None<text:line-break/> <text:s text:c="3"/>preferred_language: str = "pa"<text:line-break/> <text:s text:c="3"/>guardian_name: str | None = None<text:line-break/> <text:s text:c="3"/>guardian_phone: str | None = None</text:p>
      <text:h text:style-name="Heading_20_3" text:outline-level="3">2. Add repository layer</text:h>
      <text:p text:style-name="Text_20_body">Files:</text:p>
      <text:p text:style-name="P4">app/repositories/patient_repo.py<text:line-break/>app/repositories/practitioner_repo.py</text:p>
      <text:p text:style-name="Text_20_body"><text:soft-page-break/>Responsibilities:</text:p>
      <text:list text:style-name="L14">
        <text:list-item>
          <text:p text:style-name="P15">create patient</text:p>
        </text:list-item>
        <text:list-item>
          <text:p text:style-name="P15">get patient</text:p>
        </text:list-item>
        <text:list-item>
          <text:p text:style-name="P15">update patient</text:p>
        </text:list-item>
        <text:list-item>
          <text:p text:style-name="P15">search patient</text:p>
        </text:list-item>
      </text:list>
      <text:h text:style-name="Heading_20_3" text:outline-level="3" text:is-list-header="true">3. Add service layer</text:h>
      <text:p text:style-name="Text_20_body">Files:</text:p>
      <text:p text:style-name="P4">app/services/patient_service.py<text:line-break/>app/services/practitioner_service.py</text:p>
      <text:p text:style-name="Text_20_body">Responsibilities:</text:p>
      <text:list text:style-name="L15">
        <text:list-item>
          <text:p text:style-name="P16">business validation</text:p>
        </text:list-item>
        <text:list-item>
          <text:p text:style-name="P16">duplicate checks</text:p>
        </text:list-item>
        <text:list-item>
          <text:p text:style-name="P16">linkage logic</text:p>
        </text:list-item>
      </text:list>
      <text:h text:style-name="Heading_20_3" text:outline-level="3" text:is-list-header="true">4. Add routes</text:h>
      <text:p text:style-name="P4">GET <text:s text:c="3"/>/api/v1/patients/{id}<text:line-break/>POST <text:s text:c="2"/>/api/v1/patients<text:line-break/>PATCH <text:s/>/api/v1/patients/{id}<text:line-break/>GET <text:s text:c="3"/>/api/v1/patients?query=...<text:line-break/>GET <text:s text:c="3"/>/api/v1/practitioners/{id}</text:p>
      <text:h text:style-name="Heading_20_3" text:outline-level="3">5. Support assisted registration</text:h>
      <text:p text:style-name="Text_20_body">This must work for:</text:p>
      <text:list text:style-name="L16">
        <text:list-item>
          <text:p text:style-name="P17">child patient</text:p>
        </text:list-item>
        <text:list-item>
          <text:p text:style-name="P17">elderly patient</text:p>
        </text:list-item>
        <text:list-item>
          <text:p text:style-name="P17">patient without phone</text:p>
        </text:list-item>
      </text:list>
      <text:p text:style-name="Text_20_body">Rule:</text:p>
      <text:list text:style-name="L17">
        <text:list-item>
          <text:p text:style-name="P18">guardian phone is contact metadata</text:p>
        </text:list-item>
        <text:list-item>
          <text:p text:style-name="P18">patient remains separate patient record</text:p>
        </text:list-item>
      </text:list>
      <text:h text:style-name="Heading_20_2" text:outline-level="2" text:is-list-header="true">Done when</text:h>
      <text:list text:style-name="L18">
        <text:list-item>
          <text:p text:style-name="P19">patient creation works with and without phone</text:p>
        </text:list-item>
        <text:list-item>
          <text:p text:style-name="P19">search works</text:p>
        </text:list-item>
        <text:list-item>
          <text:p text:style-name="P19">practitioner records are retrievable</text:p>
        </text:list-item>
      </text:list>
      <text:p text:style-name="Horizontal_20_Line"><text:soft-page-break/></text:p>
      <text:h text:style-name="Heading_20_2" text:outline-level="2">Phase 5: Appointments and Encounters</text:h>
      <text:h text:style-name="Heading_20_2" text:outline-level="2">Goal</text:h>
      <text:p text:style-name="Text_20_body">Build the core consultation lifecycle.</text:p>
      <text:h text:style-name="Heading_20_2" text:outline-level="2">Exact tasks</text:h>
      <text:h text:style-name="Heading_20_3" text:outline-level="3">1. Add models</text:h>
      <text:list text:style-name="L19">
        <text:list-item>
          <text:p text:style-name="P20"><text:span text:style-name="T2">appointments</text:span></text:p>
        </text:list-item>
        <text:list-item>
          <text:p text:style-name="P20"><text:span text:style-name="T2">encounters</text:span></text:p>
        </text:list-item>
        <text:list-item>
          <text:p text:style-name="P20"><text:span text:style-name="T2">encounter_participants</text:span></text:p>
        </text:list-item>
        <text:list-item>
          <text:p text:style-name="P20"><text:span text:style-name="T2">consultation_notes</text:span></text:p>
        </text:list-item>
      </text:list>
      <text:h text:style-name="Heading_20_3" text:outline-level="3" text:is-list-header="true">2. Add schemas</text:h>
      <text:p text:style-name="P4">app/schemas/appointment.py<text:line-break/>app/schemas/encounter.py</text:p>
      <text:h text:style-name="Heading_20_3" text:outline-level="3">3. Add routes</text:h>
      <text:p text:style-name="P4">POST <text:s/>/api/v1/appointments<text:line-break/>GET <text:s text:c="2"/>/api/v1/appointments<text:line-break/>PATCH /api/v1/appointments/{id}<text:line-break/>POST <text:s/>/api/v1/encounters<text:line-break/>GET <text:s text:c="2"/>/api/v1/encounters/{id}<text:line-break/>POST <text:s/>/api/v1/encounters/{id}/summary</text:p>
      <text:h text:style-name="Heading_20_3" text:outline-level="3">4. Business rules</text:h>
      <text:list text:style-name="L20">
        <text:list-item>
          <text:p text:style-name="P21">appointment and encounter are separate concepts</text:p>
        </text:list-item>
        <text:list-item>
          <text:p text:style-name="P21">one appointment may create one encounter</text:p>
        </text:list-item>
        <text:list-item>
          <text:p text:style-name="P22">encounter mode must support:</text:p>
          <text:list>
            <text:list-item>
              <text:p text:style-name="P21">video</text:p>
            </text:list-item>
            <text:list-item>
              <text:p text:style-name="P21">audio</text:p>
            </text:list-item>
            <text:list-item>
              <text:p text:style-name="P21">async</text:p>
            </text:list-item>
          </text:list>
        </text:list-item>
        <text:list-item>
          <text:p text:style-name="P21">assisted actor can create encounter, but patient remains the owner</text:p>
        </text:list-item>
      </text:list>
      <text:h text:style-name="Heading_20_3" text:outline-level="3" text:is-list-header="true">5. Add minimal code skeleton</text:h>
      <text:p text:style-name="P4">@router.post("/appointments")<text:line-break/><text:soft-page-break/>def create_appointment(payload: AppointmentCreate, db: Session = Depends(get_db)):<text:line-break/> <text:s text:c="3"/>return appointment_service.create(db, payload)</text:p>
      <text:h text:style-name="Heading_20_2" text:outline-level="2">Done when</text:h>
      <text:list text:style-name="L21">
        <text:list-item>
          <text:p text:style-name="P23">appointment booking works</text:p>
        </text:list-item>
        <text:list-item>
          <text:p text:style-name="P23">encounter creation works</text:p>
        </text:list-item>
        <text:list-item>
          <text:p text:style-name="P23">consultation summary can be stored</text:p>
        </text:list-item>
      </text:list>
      <text:p text:style-name="Horizontal_20_Line"/>
      <text:h text:style-name="Heading_20_2" text:outline-level="2">Phase 6: Clinical Records</text:h>
      <text:h text:style-name="Heading_20_2" text:outline-level="2">Goal</text:h>
      <text:p text:style-name="Text_20_body">Store actual medical details in a structured and auditable way.</text:p>
      <text:h text:style-name="Heading_20_2" text:outline-level="2">Exact tasks</text:h>
      <text:h text:style-name="Heading_20_3" text:outline-level="3">1. Add models</text:h>
      <text:list text:style-name="L22">
        <text:list-item>
          <text:p text:style-name="P24"><text:span text:style-name="T2">observations</text:span></text:p>
        </text:list-item>
        <text:list-item>
          <text:p text:style-name="P24"><text:span text:style-name="T2">conditions</text:span></text:p>
        </text:list-item>
        <text:list-item>
          <text:p text:style-name="P24"><text:span text:style-name="T2">allergies</text:span></text:p>
        </text:list-item>
        <text:list-item>
          <text:p text:style-name="P24"><text:span text:style-name="T2">attachments</text:span></text:p>
        </text:list-item>
        <text:list-item>
          <text:p text:style-name="P24"><text:span text:style-name="T2">medication_requests</text:span></text:p>
        </text:list-item>
      </text:list>
      <text:h text:style-name="Heading_20_3" text:outline-level="3" text:is-list-header="true">2. Add endpoints</text:h>
      <text:p text:style-name="Text_20_body">You can either expose separate route files or nest them under encounters/patients.</text:p>
      <text:p text:style-name="Text_20_body">Suggested:</text:p>
      <text:p text:style-name="P4">POST /api/v1/observations<text:line-break/>POST /api/v1/conditions<text:line-break/>POST /api/v1/allergies<text:line-break/>POST /api/v1/medication-requests<text:line-break/>POST /api/v1/uploads</text:p>
      <text:h text:style-name="Heading_20_3" text:outline-level="3">3. High-risk rules</text:h>
      <text:list text:style-name="L23">
        <text:list-item>
          <text:p text:style-name="P25">allergies need explicit audit trail</text:p>
        </text:list-item>
        <text:list-item>
          <text:p text:style-name="P25">medication changes need provenance</text:p>
        </text:list-item>
        <text:list-item>
          <text:p text:style-name="P25">observations should be append-first</text:p>
        </text:list-item>
      </text:list>
      <text:h text:style-name="Heading_20_3" text:outline-level="3" text:is-list-header="true"><text:soft-page-break/>4. Add provenance hooks</text:h>
      <text:p text:style-name="Text_20_body">Every high-risk write should produce provenance metadata:</text:p>
      <text:list text:style-name="L24">
        <text:list-item>
          <text:p text:style-name="P26">who changed it</text:p>
        </text:list-item>
        <text:list-item>
          <text:p text:style-name="P26">when</text:p>
        </text:list-item>
        <text:list-item>
          <text:p text:style-name="P26">from which device</text:p>
        </text:list-item>
        <text:list-item>
          <text:p text:style-name="P26">whether it was AI-assisted</text:p>
        </text:list-item>
      </text:list>
      <text:h text:style-name="Heading_20_2" text:outline-level="2" text:is-list-header="true">Done when</text:h>
      <text:list text:style-name="L25">
        <text:list-item>
          <text:p text:style-name="P27">doctor can record clinical notes and vitals</text:p>
        </text:list-item>
        <text:list-item>
          <text:p text:style-name="P27">allergies and medication requests are stored safely</text:p>
        </text:list-item>
      </text:list>
      <text:p text:style-name="Horizontal_20_Line"/>
      <text:h text:style-name="Heading_20_2" text:outline-level="2">Phase 7: Offline Sync Backend</text:h>
      <text:h text:style-name="Heading_20_2" text:outline-level="2">Goal</text:h>
      <text:p text:style-name="Text_20_body">Support offline-first clients safely.</text:p>
      <text:h text:style-name="Heading_20_2" text:outline-level="2">Exact tasks</text:h>
      <text:h text:style-name="Heading_20_3" text:outline-level="3">1. Add sync routes</text:h>
      <text:p text:style-name="P4">POST /api/v1/sync/push<text:line-break/>GET <text:s/>/api/v1/sync/pull?cursor=...<text:line-break/>POST /api/v1/sync/conflicts/{id}/resolve</text:p>
      <text:h text:style-name="Heading_20_3" text:outline-level="3">2. Add sync schemas</text:h>
      <text:p text:style-name="Text_20_body">File: <text:span text:style-name="T2">app/schemas/sync.py</text:span></text:p>
      <text:p text:style-name="P4">from pydantic import BaseModel<text:line-break/>from uuid import UUID<text:line-break/>from datetime import datetime<text:line-break/><text:line-break/><text:line-break/>class SyncOperation(BaseModel):<text:line-break/> <text:s text:c="3"/>operation_id: UUID<text:line-break/> <text:s text:c="3"/>entity_type: str<text:line-break/> <text:s text:c="3"/>entity_id: UUID<text:line-break/> <text:s text:c="3"/>action: str<text:line-break/> <text:s text:c="3"/>base_version: int<text:line-break/> <text:s text:c="3"/>payload: dict<text:line-break/> <text:s text:c="3"/>actor_user_id: UUID<text:line-break/> <text:s text:c="3"/>device_id: UUID<text:line-break/> <text:s text:c="3"/>created_at: datetime</text:p>
      <text:h text:style-name="Heading_20_3" text:outline-level="3"><text:soft-page-break/>3. Add sync service</text:h>
      <text:p text:style-name="Text_20_body">File: <text:span text:style-name="T2">app/services/sync_service.py</text:span></text:p>
      <text:p text:style-name="Text_20_body">Responsibilities:</text:p>
      <text:list text:style-name="L26">
        <text:list-item>
          <text:p text:style-name="P28">validate operation</text:p>
        </text:list-item>
        <text:list-item>
          <text:p text:style-name="P28">dedupe by operation ID</text:p>
        </text:list-item>
        <text:list-item>
          <text:p text:style-name="P28">check base version</text:p>
        </text:list-item>
        <text:list-item>
          <text:p text:style-name="P28">apply mutation</text:p>
        </text:list-item>
        <text:list-item>
          <text:p text:style-name="P28">emit conflict if unsafe</text:p>
        </text:list-item>
        <text:list-item>
          <text:p text:style-name="P28">return new cursor</text:p>
        </text:list-item>
      </text:list>
      <text:h text:style-name="Heading_20_3" text:outline-level="3" text:is-list-header="true">4. Add conflict storage</text:h>
      <text:p text:style-name="Text_20_body">If conflicts become complex, you may add a dedicated <text:span text:style-name="T2">sync_conflicts</text:span> table.</text:p>
      <text:p text:style-name="Text_20_body">For MVP, conflict metadata may be returned dynamically if simpler.</text:p>
      <text:h text:style-name="Heading_20_3" text:outline-level="3">5. Conflict rules</text:h>
      <text:list text:style-name="L27">
        <text:list-item>
          <text:p text:style-name="P29">safe metadata can merge</text:p>
        </text:list-item>
        <text:list-item>
          <text:p text:style-name="P29">allergy conflicts must not silently overwrite</text:p>
        </text:list-item>
        <text:list-item>
          <text:p text:style-name="P29">medication conflicts must not silently overwrite</text:p>
        </text:list-item>
        <text:list-item>
          <text:p text:style-name="P29">encounter summary conflicts should require review</text:p>
        </text:list-item>
      </text:list>
      <text:h text:style-name="Heading_20_2" text:outline-level="2" text:is-list-header="true">Done when</text:h>
      <text:list text:style-name="L28">
        <text:list-item>
          <text:p text:style-name="P30">offline-created record can sync later</text:p>
        </text:list-item>
        <text:list-item>
          <text:p text:style-name="P30">duplicate operation IDs are idempotent</text:p>
        </text:list-item>
        <text:list-item>
          <text:p text:style-name="P30">stale version conflicts are visible</text:p>
        </text:list-item>
      </text:list>
      <text:p text:style-name="Horizontal_20_Line"/>
      <text:h text:style-name="Heading_20_2" text:outline-level="2">Phase 8: Prescriptions, Pharmacy, and Inventory</text:h>
      <text:h text:style-name="Heading_20_2" text:outline-level="2">Goal</text:h>
      <text:p text:style-name="Text_20_body">Complete the care journey after the consultation.</text:p>
      <text:h text:style-name="Heading_20_2" text:outline-level="2"><text:soft-page-break/>Exact tasks</text:h>
      <text:h text:style-name="Heading_20_3" text:outline-level="3">1. Add models</text:h>
      <text:list text:style-name="L29">
        <text:list-item>
          <text:p text:style-name="P31"><text:span text:style-name="T2">prescriptions</text:span></text:p>
        </text:list-item>
        <text:list-item>
          <text:p text:style-name="P31"><text:span text:style-name="T2">prescription_items</text:span></text:p>
        </text:list-item>
        <text:list-item>
          <text:p text:style-name="P31"><text:span text:style-name="T2">medicine_catalog</text:span></text:p>
        </text:list-item>
        <text:list-item>
          <text:p text:style-name="P31"><text:span text:style-name="T2">stock_batches</text:span></text:p>
        </text:list-item>
        <text:list-item>
          <text:p text:style-name="P31"><text:span text:style-name="T2">stock_movements</text:span></text:p>
        </text:list-item>
        <text:list-item>
          <text:p text:style-name="P31"><text:span text:style-name="T2">fulfillments</text:span></text:p>
        </text:list-item>
        <text:list-item>
          <text:p text:style-name="P31"><text:span text:style-name="T2">reorder_requests</text:span></text:p>
        </text:list-item>
      </text:list>
      <text:h text:style-name="Heading_20_3" text:outline-level="3" text:is-list-header="true">2. Add endpoints</text:h>
      <text:p text:style-name="P4">POST /api/v1/prescriptions<text:line-break/>GET <text:s/>/api/v1/prescriptions/{id}<text:line-break/>GET <text:s/>/api/v1/pharmacies/availability?medicine=...<text:line-break/>POST /api/v1/inventory/stock-intake<text:line-break/>POST /api/v1/inventory/stock-adjustment<text:line-break/>POST /api/v1/fulfillments/{id}/accept<text:line-break/>POST /api/v1/fulfillments/{id}/dispense</text:p>
      <text:h text:style-name="Heading_20_3" text:outline-level="3">3. Business rules</text:h>
      <text:list text:style-name="L30">
        <text:list-item>
          <text:p text:style-name="P32">medicine lookup goes through normalized <text:span text:style-name="T2">medicine_catalog</text:span></text:p>
        </text:list-item>
        <text:list-item>
          <text:p text:style-name="P32">stock is batch-aware</text:p>
        </text:list-item>
        <text:list-item>
          <text:p text:style-name="P32">stock movement is append-only</text:p>
        </text:list-item>
        <text:list-item>
          <text:p text:style-name="P32">availability is latest known truth, not magic certainty</text:p>
        </text:list-item>
        <text:list-item>
          <text:p text:style-name="P32">fulfillment can be partial</text:p>
        </text:list-item>
      </text:list>
      <text:h text:style-name="Heading_20_3" text:outline-level="3" text:is-list-header="true">4. Important service functions</text:h>
      <text:list text:style-name="L31">
        <text:list-item>
          <text:p text:style-name="P33"><text:span text:style-name="T2">create_prescription</text:span></text:p>
        </text:list-item>
        <text:list-item>
          <text:p text:style-name="P33"><text:span text:style-name="T2">search_available_pharmacies</text:span></text:p>
        </text:list-item>
        <text:list-item>
          <text:p text:style-name="P33"><text:span text:style-name="T2">record_stock_intake</text:span></text:p>
        </text:list-item>
        <text:list-item>
          <text:p text:style-name="P33"><text:span text:style-name="T2">record_stock_adjustment</text:span></text:p>
        </text:list-item>
        <text:list-item>
          <text:p text:style-name="P33"><text:span text:style-name="T2">accept_fulfillment</text:span></text:p>
        </text:list-item>
        <text:list-item>
          <text:p text:style-name="P33"><text:span text:style-name="T2">dispense_fulfillment</text:span></text:p>
        </text:list-item>
      </text:list>
      <text:h text:style-name="Heading_20_2" text:outline-level="2" text:is-list-header="true"><text:soft-page-break/>Done when</text:h>
      <text:list text:style-name="L32">
        <text:list-item>
          <text:p text:style-name="P34">doctor can generate prescription</text:p>
        </text:list-item>
        <text:list-item>
          <text:p text:style-name="P34">pharmacy can accept and dispense</text:p>
        </text:list-item>
        <text:list-item>
          <text:p text:style-name="P34">inventory reflects changes safely</text:p>
        </text:list-item>
      </text:list>
      <text:p text:style-name="Horizontal_20_Line"/>
      <text:h text:style-name="Heading_20_2" text:outline-level="2">Phase 9: Consent, Audit, and Provenance</text:h>
      <text:h text:style-name="Heading_20_2" text:outline-level="2">Goal</text:h>
      <text:p text:style-name="Text_20_body">Make the backend trustworthy and ABHA-ready.</text:p>
      <text:h text:style-name="Heading_20_2" text:outline-level="2">Exact tasks</text:h>
      <text:h text:style-name="Heading_20_3" text:outline-level="3">1. Add models</text:h>
      <text:list text:style-name="L33">
        <text:list-item>
          <text:p text:style-name="P35"><text:span text:style-name="T2">consents</text:span></text:p>
        </text:list-item>
        <text:list-item>
          <text:p text:style-name="P35"><text:span text:style-name="T2">provenance_events</text:span></text:p>
        </text:list-item>
        <text:list-item>
          <text:p text:style-name="P35"><text:span text:style-name="T2">audit_events</text:span></text:p>
        </text:list-item>
      </text:list>
      <text:h text:style-name="Heading_20_3" text:outline-level="3" text:is-list-header="true">2. Add endpoints</text:h>
      <text:p text:style-name="P4">GET <text:s/>/api/v1/patients/{id}/consents<text:line-break/>POST /api/v1/patients/{id}/consents</text:p>
      <text:h text:style-name="Heading_20_3" text:outline-level="3">3. Add audit capture points</text:h>
      <text:p text:style-name="Text_20_body">Log:</text:p>
      <text:list text:style-name="L34">
        <text:list-item>
          <text:p text:style-name="P36">login</text:p>
        </text:list-item>
        <text:list-item>
          <text:p text:style-name="P36">record access</text:p>
        </text:list-item>
        <text:list-item>
          <text:p text:style-name="P36">sensitive edits</text:p>
        </text:list-item>
        <text:list-item>
          <text:p text:style-name="P36">prescription actions</text:p>
        </text:list-item>
        <text:list-item>
          <text:p text:style-name="P36">fulfillment status changes</text:p>
        </text:list-item>
      </text:list>
      <text:h text:style-name="Heading_20_3" text:outline-level="3" text:is-list-header="true">4. Add provenance capture points</text:h>
      <text:p text:style-name="Text_20_body">Track:</text:p>
      <text:list text:style-name="L35">
        <text:list-item>
          <text:p text:style-name="P37">actor</text:p>
        </text:list-item>
        <text:list-item>
          <text:p text:style-name="P37">entity</text:p>
        </text:list-item>
        <text:list-item>
          <text:p text:style-name="P37"><text:soft-page-break/>action</text:p>
        </text:list-item>
        <text:list-item>
          <text:p text:style-name="P37">device</text:p>
        </text:list-item>
        <text:list-item>
          <text:p text:style-name="P37">metadata</text:p>
        </text:list-item>
      </text:list>
      <text:h text:style-name="Heading_20_2" text:outline-level="2" text:is-list-header="true">Done when</text:h>
      <text:list text:style-name="L36">
        <text:list-item>
          <text:p text:style-name="P38">sensitive operations are traceable</text:p>
        </text:list-item>
        <text:list-item>
          <text:p text:style-name="P38">consent is recorded</text:p>
        </text:list-item>
        <text:list-item>
          <text:p text:style-name="P38">future ABHA integration remains practical</text:p>
        </text:list-item>
      </text:list>
      <text:p text:style-name="Horizontal_20_Line"/>
      <text:h text:style-name="Heading_20_2" text:outline-level="2">Phase 10: AI Support Hooks</text:h>
      <text:h text:style-name="Heading_20_2" text:outline-level="2">Goal</text:h>
      <text:p text:style-name="Text_20_body">Add backend support for AI safely without turning AI into the core engine.</text:p>
      <text:h text:style-name="Heading_20_2" text:outline-level="2">Exact tasks</text:h>
      <text:h text:style-name="Heading_20_3" text:outline-level="3">1. Add models</text:h>
      <text:list text:style-name="L37">
        <text:list-item>
          <text:p text:style-name="P39"><text:span text:style-name="T2">triage_sessions</text:span></text:p>
        </text:list-item>
        <text:list-item>
          <text:p text:style-name="P39"><text:span text:style-name="T2">ai_assistance_logs</text:span></text:p>
        </text:list-item>
        <text:list-item>
          <text:p text:style-name="P39"><text:span text:style-name="T2">ai_output_reviews</text:span></text:p>
        </text:list-item>
      </text:list>
      <text:h text:style-name="Heading_20_3" text:outline-level="3" text:is-list-header="true">2. Add service layer</text:h>
      <text:p text:style-name="Text_20_body">File:</text:p>
      <text:p text:style-name="P4">app/services/ai_triage_service.py</text:p>
      <text:p text:style-name="Text_20_body">Responsibilities:</text:p>
      <text:list text:style-name="L38">
        <text:list-item>
          <text:p text:style-name="P40">call AI provider adapter</text:p>
        </text:list-item>
        <text:list-item>
          <text:p text:style-name="P40">validate structured output</text:p>
        </text:list-item>
        <text:list-item>
          <text:p text:style-name="P40">store model metadata</text:p>
        </text:list-item>
        <text:list-item>
          <text:p text:style-name="P40">attach provenance</text:p>
        </text:list-item>
      </text:list>
      <text:h text:style-name="Heading_20_3" text:outline-level="3" text:is-list-header="true">3. Add internal contracts</text:h>
      <text:p text:style-name="Text_20_body">Suggested output shape:</text:p>
      <text:p text:style-name="P4">{<text:line-break/><text:soft-page-break/> <text:s/>"urgency": "within_24h",<text:line-break/> <text:s/>"summary": "Fever for 2 days with cough",<text:line-break/> <text:s/>"red_flags": [],<text:line-break/> <text:s/>"recommended_action": "doctor_review"<text:line-break/>}</text:p>
      <text:h text:style-name="Heading_20_3" text:outline-level="3">4. Hard rule</text:h>
      <text:p text:style-name="Text_20_body">AI must not:</text:p>
      <text:list text:style-name="L39">
        <text:list-item>
          <text:p text:style-name="P41">create diagnosis automatically</text:p>
        </text:list-item>
        <text:list-item>
          <text:p text:style-name="P41">prescribe automatically</text:p>
        </text:list-item>
        <text:list-item>
          <text:p text:style-name="P41">bypass doctor review for sensitive outcomes</text:p>
        </text:list-item>
      </text:list>
      <text:h text:style-name="Heading_20_2" text:outline-level="2" text:is-list-header="true">Done when</text:h>
      <text:list text:style-name="L40">
        <text:list-item>
          <text:p text:style-name="P42">AI support service can store structured assistance logs</text:p>
        </text:list-item>
      </text:list>
      <text:p text:style-name="Horizontal_20_Line"/>
      <text:h text:style-name="Heading_20_2" text:outline-level="2">Phase 11: Attachments, Notifications, and External Adapters</text:h>
      <text:h text:style-name="Heading_20_2" text:outline-level="2">Goal</text:h>
      <text:p text:style-name="Text_20_body">Connect the backend to real external behaviors without coupling business logic to vendors.</text:p>
      <text:h text:style-name="Heading_20_2" text:outline-level="2">Exact tasks</text:h>
      <text:h text:style-name="Heading_20_3" text:outline-level="3">1. Create integration folders</text:h>
      <text:p text:style-name="P4">app/integrations/sms/<text:line-break/>app/integrations/storage/<text:line-break/>app/integrations/ai/<text:line-break/>app/integrations/abdm/</text:p>
      <text:h text:style-name="Heading_20_3" text:outline-level="3">2. Add interfaces/adapters</text:h>
      <text:p text:style-name="Text_20_body">Examples:</text:p>
      <text:list text:style-name="L41">
        <text:list-item>
          <text:p text:style-name="P43"><text:span text:style-name="T2">sms_provider.py</text:span></text:p>
        </text:list-item>
        <text:list-item>
          <text:p text:style-name="P43"><text:span text:style-name="T2">storage_provider.py</text:span></text:p>
        </text:list-item>
        <text:list-item>
          <text:p text:style-name="P43"><text:span text:style-name="T2">ai_provider.py</text:span></text:p>
        </text:list-item>
        <text:list-item>
          <text:p text:style-name="P43"><text:span text:style-name="T2">abdm_adapter.py</text:span></text:p>
        </text:list-item>
      </text:list>
      <text:h text:style-name="Heading_20_3" text:outline-level="3" text:is-list-header="true">3. Use mock-first design</text:h>
      <text:p text:style-name="Text_20_body">Start with:</text:p>
      <text:list text:style-name="L42">
        <text:list-item>
          <text:p text:style-name="P44"><text:soft-page-break/>mock SMS sender</text:p>
        </text:list-item>
        <text:list-item>
          <text:p text:style-name="P44">local/mock storage</text:p>
        </text:list-item>
        <text:list-item>
          <text:p text:style-name="P44">mock AI</text:p>
        </text:list-item>
      </text:list>
      <text:p text:style-name="Text_20_body">Then swap providers later.</text:p>
      <text:h text:style-name="Heading_20_2" text:outline-level="2">Done when</text:h>
      <text:list text:style-name="L43">
        <text:list-item>
          <text:p text:style-name="P45">backend can run locally without real vendor dependency</text:p>
        </text:list-item>
        <text:list-item>
          <text:p text:style-name="P45">provider code is isolated from business modules</text:p>
        </text:list-item>
      </text:list>
      <text:p text:style-name="Horizontal_20_Line"/>
      <text:h text:style-name="Heading_20_2" text:outline-level="2">Phase 12: Testing and Hardening</text:h>
      <text:h text:style-name="Heading_20_2" text:outline-level="2">Goal</text:h>
      <text:p text:style-name="Text_20_body">Make the backend stable enough for end-to-end integration.</text:p>
      <text:h text:style-name="Heading_20_2" text:outline-level="2">Exact tasks</text:h>
      <text:h text:style-name="Heading_20_3" text:outline-level="3">1. Create test folders</text:h>
      <text:p text:style-name="P4">tests/unit/<text:line-break/>tests/integration/<text:line-break/>tests/contract/</text:p>
      <text:h text:style-name="Heading_20_3" text:outline-level="3">2. Add minimum test suites</text:h>
      <text:h text:style-name="Heading_20_4" text:outline-level="4">Auth tests</text:h>
      <text:list text:style-name="L44">
        <text:list-item>
          <text:p text:style-name="P46">OTP request</text:p>
        </text:list-item>
        <text:list-item>
          <text:p text:style-name="P46">OTP verify</text:p>
        </text:list-item>
        <text:list-item>
          <text:p text:style-name="P46">staff login</text:p>
        </text:list-item>
        <text:list-item>
          <text:p text:style-name="P46">token refresh</text:p>
        </text:list-item>
        <text:list-item>
          <text:p text:style-name="P46">logout</text:p>
        </text:list-item>
      </text:list>
      <text:h text:style-name="Heading_20_4" text:outline-level="4" text:is-list-header="true">Identity tests</text:h>
      <text:list text:style-name="L45">
        <text:list-item>
          <text:p text:style-name="P47">patient without phone</text:p>
        </text:list-item>
        <text:list-item>
          <text:p text:style-name="P47">child patient with guardian contact</text:p>
        </text:list-item>
        <text:list-item>
          <text:p text:style-name="P47">duplicate patient identifier rejection</text:p>
        </text:list-item>
        <text:list-item>
          <text:p text:style-name="P47">ABHA optional linkage</text:p>
        </text:list-item>
      </text:list>
      <text:h text:style-name="Heading_20_4" text:outline-level="4" text:is-list-header="true"><text:soft-page-break/>Workflow tests</text:h>
      <text:list text:style-name="L46">
        <text:list-item>
          <text:p text:style-name="P48">create appointment</text:p>
        </text:list-item>
        <text:list-item>
          <text:p text:style-name="P48">create encounter</text:p>
        </text:list-item>
        <text:list-item>
          <text:p text:style-name="P48">create observation</text:p>
        </text:list-item>
        <text:list-item>
          <text:p text:style-name="P48">issue prescription</text:p>
        </text:list-item>
        <text:list-item>
          <text:p text:style-name="P48">accept fulfillment</text:p>
        </text:list-item>
        <text:list-item>
          <text:p text:style-name="P48">dispense medicine</text:p>
        </text:list-item>
      </text:list>
      <text:h text:style-name="Heading_20_4" text:outline-level="4" text:is-list-header="true">Sync tests</text:h>
      <text:list text:style-name="L47">
        <text:list-item>
          <text:p text:style-name="P49">duplicate operation ID replay</text:p>
        </text:list-item>
        <text:list-item>
          <text:p text:style-name="P49">conflict handling</text:p>
        </text:list-item>
        <text:list-item>
          <text:p text:style-name="P49">cursor progression</text:p>
        </text:list-item>
      </text:list>
      <text:h text:style-name="Heading_20_3" text:outline-level="3" text:is-list-header="true">3. Add lint and format commands</text:h>
      <text:p text:style-name="P4">uv run ruff check .<text:line-break/>uv run mypy app<text:line-break/>uv run pytest</text:p>
      <text:h text:style-name="Heading_20_2" text:outline-level="2">Done when</text:h>
      <text:list text:style-name="L48">
        <text:list-item>
          <text:p text:style-name="P50">core routes are covered</text:p>
        </text:list-item>
        <text:list-item>
          <text:p text:style-name="P50">no major workflow breaks on refactor</text:p>
        </text:list-item>
      </text:list>
      <text:p text:style-name="Horizontal_20_Line"/>
      <text:h text:style-name="Heading_20_2" text:outline-level="2">Phase 13: Local Dev and Deployment Readiness</text:h>
      <text:h text:style-name="Heading_20_2" text:outline-level="2">Goal</text:h>
      <text:p text:style-name="Text_20_body">Make the backend easy to run locally and ship to the cloud.</text:p>
      <text:h text:style-name="Heading_20_2" text:outline-level="2">Exact tasks</text:h>
      <text:h text:style-name="Heading_20_3" text:outline-level="3">1. Finalize Dockerfile for Deployment</text:h>
      <text:p text:style-name="Text_20_body">This Dockerfile is specifically for building the production container to run on services like Render.</text:p>
      <text:p text:style-name="P4">FROM python:3.12-slim<text:line-break/>WORKDIR /app<text:line-break/>COPY . /app<text:line-break/>RUN pip install --no-cache-dir -e .<text:line-break/>CMD ["uvicorn", "app.main:app", "--host", "0.0.0.0", "--port", "8000"]</text:p>
      <text:h text:style-name="Heading_20_3" text:outline-level="3"><text:soft-page-break/>2. Define Cloud Provisioning Requirements</text:h>
      <text:p text:style-name="Text_20_body">Document the exact managed cloud services needed for production (e.g., Render Postgres, Upstash Redis) to ensure production URLs are separated from local development.</text:p>
      <text:h text:style-name="Heading_20_3" text:outline-level="3">3. Add health endpoints</text:h>
      <text:p text:style-name="P4">GET /health/live<text:line-break/>GET /health/ready</text:p>
      <text:h text:style-name="Heading_20_3" text:outline-level="3">4. Add seed scripts</text:h>
      <text:p text:style-name="Text_20_body">Seed:</text:p>
      <text:list text:style-name="L49">
        <text:list-item>
          <text:p text:style-name="P51">roles</text:p>
        </text:list-item>
        <text:list-item>
          <text:p text:style-name="P51">sample doctor</text:p>
        </text:list-item>
        <text:list-item>
          <text:p text:style-name="P51">sample pharmacist</text:p>
        </text:list-item>
        <text:list-item>
          <text:p text:style-name="P51">sample pharmacy</text:p>
        </text:list-item>
        <text:list-item>
          <text:p text:style-name="P51">sample medicine catalog</text:p>
        </text:list-item>
      </text:list>
      <text:h text:style-name="Heading_20_2" text:outline-level="2" text:is-list-header="true">Done when</text:h>
      <text:list text:style-name="L50">
        <text:list-item>
          <text:p text:style-name="P52">backend runs via Docker</text:p>
        </text:list-item>
        <text:list-item>
          <text:p text:style-name="P52">DB is migratable</text:p>
        </text:list-item>
        <text:list-item>
          <text:p text:style-name="P52">local demo data is available</text:p>
        </text:list-item>
      </text:list>
      <text:p text:style-name="Horizontal_20_Line"/>
      <text:h text:style-name="Heading_20_2" text:outline-level="2">Recommended milestone checkpoints</text:h>
      <text:h text:style-name="Heading_20_2" text:outline-level="2">Milestone 1</text:h>
      <text:p text:style-name="Text_20_body">Complete:</text:p>
      <text:list text:style-name="L51">
        <text:list-item>
          <text:p text:style-name="P53">bootstrap</text:p>
        </text:list-item>
        <text:list-item>
          <text:p text:style-name="P53">DB</text:p>
        </text:list-item>
        <text:list-item>
          <text:p text:style-name="P53">auth</text:p>
        </text:list-item>
        <text:list-item>
          <text:p text:style-name="P53">identity</text:p>
        </text:list-item>
      </text:list>
      <text:p text:style-name="Text_20_body">You should then be able to:</text:p>
      <text:list text:style-name="L52">
        <text:list-item>
          <text:p text:style-name="P54">start backend</text:p>
        </text:list-item>
        <text:list-item>
          <text:p text:style-name="P54">log in patient</text:p>
        </text:list-item>
        <text:list-item>
          <text:p text:style-name="P54"><text:soft-page-break/>log in staff</text:p>
        </text:list-item>
        <text:list-item>
          <text:p text:style-name="P54">create patients</text:p>
        </text:list-item>
      </text:list>
      <text:h text:style-name="Heading_20_2" text:outline-level="2" text:is-list-header="true">Milestone 2</text:h>
      <text:p text:style-name="Text_20_body">Complete:</text:p>
      <text:list text:style-name="L53">
        <text:list-item>
          <text:p text:style-name="P55">appointments</text:p>
        </text:list-item>
        <text:list-item>
          <text:p text:style-name="P55">encounters</text:p>
        </text:list-item>
        <text:list-item>
          <text:p text:style-name="P55">clinical records</text:p>
        </text:list-item>
      </text:list>
      <text:p text:style-name="Text_20_body">You should then be able to:</text:p>
      <text:list text:style-name="L54">
        <text:list-item>
          <text:p text:style-name="P56">register patient</text:p>
        </text:list-item>
        <text:list-item>
          <text:p text:style-name="P56">book consultation</text:p>
        </text:list-item>
        <text:list-item>
          <text:p text:style-name="P56">create encounter</text:p>
        </text:list-item>
        <text:list-item>
          <text:p text:style-name="P56">save medical records</text:p>
        </text:list-item>
      </text:list>
      <text:h text:style-name="Heading_20_2" text:outline-level="2" text:is-list-header="true">Milestone 3</text:h>
      <text:p text:style-name="Text_20_body">Complete:</text:p>
      <text:list text:style-name="L55">
        <text:list-item>
          <text:p text:style-name="P57">sync</text:p>
        </text:list-item>
        <text:list-item>
          <text:p text:style-name="P57">prescription</text:p>
        </text:list-item>
        <text:list-item>
          <text:p text:style-name="P57">pharmacy</text:p>
        </text:list-item>
      </text:list>
      <text:p text:style-name="Text_20_body">You should then be able to:</text:p>
      <text:list text:style-name="L56">
        <text:list-item>
          <text:p text:style-name="P58">create records offline on frontend</text:p>
        </text:list-item>
        <text:list-item>
          <text:p text:style-name="P58">sync them to backend</text:p>
        </text:list-item>
        <text:list-item>
          <text:p text:style-name="P58">generate prescription</text:p>
        </text:list-item>
        <text:list-item>
          <text:p text:style-name="P58">fulfill medicine</text:p>
        </text:list-item>
      </text:list>
      <text:h text:style-name="Heading_20_2" text:outline-level="2" text:is-list-header="true">Milestone 4</text:h>
      <text:p text:style-name="Text_20_body">Complete:</text:p>
      <text:list text:style-name="L57">
        <text:list-item>
          <text:p text:style-name="P59">consent</text:p>
        </text:list-item>
        <text:list-item>
          <text:p text:style-name="P59">audit</text:p>
        </text:list-item>
        <text:list-item>
          <text:p text:style-name="P59">AI hooks</text:p>
        </text:list-item>
        <text:list-item>
          <text:p text:style-name="P59">tests</text:p>
        </text:list-item>
        <text:list-item>
          <text:p text:style-name="P59"><text:soft-page-break/>Docker</text:p>
        </text:list-item>
      </text:list>
      <text:p text:style-name="Text_20_body">You should then have a backend that is serious enough for MVP integration.</text:p>
      <text:p text:style-name="Horizontal_20_Line"/>
      <text:h text:style-name="Heading_20_2" text:outline-level="2">Final rule</text:h>
      <text:p text:style-name="Text_20_body">Do not move to the next backend phase just because code exists.</text:p>
      <text:p text:style-name="Text_20_body">Move only when:</text:p>
      <text:list text:style-name="L58">
        <text:list-item>
          <text:p text:style-name="P60">the schema is stable for that phase</text:p>
        </text:list-item>
        <text:list-item>
          <text:p text:style-name="P60">endpoints are testable</text:p>
        </text:list-item>
        <text:list-item>
          <text:p text:style-name="P60">business rules are enforced</text:p>
        </text:list-item>
        <text:list-item>
          <text:p text:style-name="P60">edge cases for that phase are understood</text:p>
        </text:list-item>
      </text:list>
      <text:p text:style-name="Text_20_body">For this project, <text:span text:style-name="T1">correctness of workflow is more important than speed of endpoint creation</text:span>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5-08T11:16:36.196699991</dc:date>
    <meta:editing-duration>PT15H32M49S</meta:editing-duration>
    <meta:editing-cycles>1</meta:editing-cycles>
    <meta:document-statistic meta:table-count="0" meta:image-count="0" meta:object-count="0" meta:page-count="24" meta:paragraph-count="501" meta:word-count="2507" meta:character-count="18491" meta:non-whitespace-character-count="16464"/>
    <meta:generator>LibreOffice/26.2.3.2$Linux_X86_64 LibreOffice_project/620$Build-2</meta:generator>
  </office:meta>
</office:document-meta>
</file>